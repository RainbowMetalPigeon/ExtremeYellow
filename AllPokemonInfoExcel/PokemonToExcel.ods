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49 THUNDERPUNCH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4 THUNDERPUNCH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4 THUNDERPUNCH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AIR_SLASH ; 33 PLAY_ROUGH ; 34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3 PETAL_DANCE ; 55 AIR_SLASH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6 PETAL_DANCE ; 58 AIR_SLASH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1 PETAL_DANCE ; 63 AIR_SLASH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YNTHESIS ; 46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5-14T13:29:18.194040300</dc:date>
    <meta:editing-duration>P49DT12H28M10S</meta:editing-duration>
    <meta:editing-cycles>514</meta:editing-cycles>
    <meta:document-statistic meta:table-count="2" meta:cell-count="5451" meta:object-count="0"/>
  </office:meta>
</office:document-meta>
</file>